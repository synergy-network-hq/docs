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Arial2" svg:font-family="Arial" style:font-family-generic="swiss"/>
    <style:font-face style:name="Consolas" svg:font-family="Consolas" style:font-family-generic="roman" style:font-pitch="variable"/>
    <style:font-face style:name="Inter" svg:font-family="Int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152cm" fo:margin-top="0cm" fo:margin-bottom="0cm" table:align="center" style:writing-mode="lr-tb"/>
    </style:style>
    <style:style style:name="Table1.A" style:family="table-column">
      <style:table-column-properties style:column-width="3.54cm"/>
    </style:style>
    <style:style style:name="Table1.B" style:family="table-column">
      <style:table-column-properties style:column-width="2.679cm"/>
    </style:style>
    <style:style style:name="Table1.C" style:family="table-column">
      <style:table-column-properties style:column-width="6.595cm"/>
    </style:style>
    <style:style style:name="Table1.D" style:family="table-column">
      <style:table-column-properties style:column-width="2.787cm"/>
    </style:style>
    <style:style style:name="Table1.E" style:family="table-column">
      <style:table-column-properties style:column-width="2.55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282cm" fo:padding-right="0.282cm" fo:padding-top="0.141cm" fo:padding-bottom="0.141cm" fo:border="0.1pt solid #000000"/>
    </style:style>
    <style:style style:name="Table2" style:family="table">
      <style:table-properties style:width="19.168cm" fo:margin-top="0cm" fo:margin-bottom="0cm" table:align="center" style:writing-mode="lr-tb"/>
    </style:style>
    <style:style style:name="Table2.A" style:family="table-column">
      <style:table-column-properties style:column-width="3.649cm"/>
    </style:style>
    <style:style style:name="Table2.B" style:family="table-column">
      <style:table-column-properties style:column-width="3.808cm"/>
    </style:style>
    <style:style style:name="Table2.C" style:family="table-column">
      <style:table-column-properties style:column-width="5.138cm"/>
    </style:style>
    <style:style style:name="Table2.D" style:family="table-column">
      <style:table-column-properties style:column-width="3.639cm"/>
    </style:style>
    <style:style style:name="Table2.E" style:family="table-column">
      <style:table-column-properties style:column-width="2.93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282cm" fo:padding-right="0.282cm" fo:padding-top="0.141cm" fo:padding-bottom="0.141cm" fo:border="0.1pt solid #000000"/>
    </style:style>
    <style:style style:name="Table3" style:family="table">
      <style:table-properties style:width="18.637cm" fo:margin-top="0cm" fo:margin-bottom="0cm" table:align="center" style:writing-mode="lr-tb"/>
    </style:style>
    <style:style style:name="Table3.A" style:family="table-column">
      <style:table-column-properties style:column-width="3.395cm"/>
    </style:style>
    <style:style style:name="Table3.B" style:family="table-column">
      <style:table-column-properties style:column-width="3.173cm"/>
    </style:style>
    <style:style style:name="Table3.C" style:family="table-column">
      <style:table-column-properties style:column-width="4.763cm"/>
    </style:style>
    <style:style style:name="Table3.D" style:family="table-column">
      <style:table-column-properties style:column-width="4.65cm"/>
    </style:style>
    <style:style style:name="Table3.E" style:family="table-column">
      <style:table-column-properties style:column-width="2.656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282cm" fo:padding-right="0.282cm" fo:padding-top="0.141cm" fo:padding-bottom="0.141cm" fo:border="0.1pt solid #000000"/>
    </style:style>
    <style:style style:name="Table4" style:family="table">
      <style:table-properties style:width="19.114cm" fo:margin-top="0cm" fo:margin-bottom="0cm" table:align="center" style:writing-mode="lr-tb"/>
    </style:style>
    <style:style style:name="Table4.A" style:family="table-column">
      <style:table-column-properties style:column-width="3.397cm"/>
    </style:style>
    <style:style style:name="Table4.B" style:family="table-column">
      <style:table-column-properties style:column-width="4.126cm"/>
    </style:style>
    <style:style style:name="Table4.C" style:family="table-column">
      <style:table-column-properties style:column-width="4.602cm"/>
    </style:style>
    <style:style style:name="Table4.D" style:family="table-column">
      <style:table-column-properties style:column-width="4.479cm"/>
    </style:style>
    <style:style style:name="Table4.E" style:family="table-column">
      <style:table-column-properties style:column-width="2.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282cm" fo:padding-right="0.282cm" fo:padding-top="0.141cm" fo:padding-bottom="0.141cm" fo:border="0.1pt solid #000000"/>
    </style:style>
    <style:style style:name="Table5" style:family="table">
      <style:table-properties style:width="19.179cm" fo:margin-top="0cm" fo:margin-bottom="0cm" table:align="center" style:writing-mode="lr-tb"/>
    </style:style>
    <style:style style:name="Table5.A" style:family="table-column">
      <style:table-column-properties style:column-width="3.554cm"/>
    </style:style>
    <style:style style:name="Table5.B" style:family="table-column">
      <style:table-column-properties style:column-width="3.334cm"/>
    </style:style>
    <style:style style:name="Table5.C" style:family="table-column">
      <style:table-column-properties style:column-width="6.033cm"/>
    </style:style>
    <style:style style:name="Table5.D" style:family="table-column">
      <style:table-column-properties style:column-width="3.493cm"/>
    </style:style>
    <style:style style:name="Table5.E" style:family="table-column">
      <style:table-column-properties style:column-width="2.766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282cm" fo:padding-right="0.282cm" fo:padding-top="0.141cm" fo:padding-bottom="0.141cm" fo:border="0.1pt solid #000000"/>
    </style:style>
    <style:style style:name="Table6" style:family="table">
      <style:table-properties style:width="15.692cm" fo:margin-top="0cm" fo:margin-bottom="0cm" table:align="center" style:writing-mode="lr-tb"/>
    </style:style>
    <style:style style:name="Table6.A" style:family="table-column">
      <style:table-column-properties style:column-width="3.207cm"/>
    </style:style>
    <style:style style:name="Table6.B" style:family="table-column">
      <style:table-column-properties style:column-width="4.182cm"/>
    </style:style>
    <style:style style:name="Table6.C" style:family="table-column">
      <style:table-column-properties style:column-width="3.201cm"/>
    </style:style>
    <style:style style:name="Table6.D" style:family="table-column">
      <style:table-column-properties style:column-width="2.692cm"/>
    </style:style>
    <style:style style:name="Table6.E" style:family="table-column">
      <style:table-column-properties style:column-width="2.409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282cm" fo:padding-right="0.282cm" fo:padding-top="0.141cm" fo:padding-bottom="0.141cm" fo:border="0.1pt solid #000000"/>
    </style:style>
    <style:style style:name="P1" style:family="paragraph" style:parent-style-name="Standard">
      <style:text-properties style:font-name="Inter" fo:font-size="10pt" fo:font-weight="bold" style:font-size-asian="10pt" style:font-weight-asian="bold" style:font-size-complex="10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Inter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Inter" fo:font-size="10pt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Inter" fo:font-size="9pt" fo:font-style="italic" style:font-size-asian="9pt" style:font-style-asian="italic" style:font-size-complex="9pt" style:font-style-complex="italic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Inter" fo:font-size="9pt" fo:font-style="italic" style:font-size-asian="9pt" style:font-style-asian="italic" style:font-size-complex="9pt" style:font-style-complex="italic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Consolas" fo:font-size="10pt" style:font-size-asian="10pt" style:font-name-complex="Consolas1" style:font-size-complex="10pt"/>
    </style:style>
    <style:style style:name="P7" style:family="paragraph" style:parent-style-name="Heading_20_2">
      <style:paragraph-properties fo:margin-top="0cm" fo:margin-bottom="0cm" loext:contextual-spacing="false" fo:line-height="100%"/>
      <style:text-properties style:font-name="Inter" fo:font-size="10pt" style:font-size-asian="10pt" style:font-size-complex="10pt"/>
    </style:style>
    <style:style style:name="P8" style:family="paragraph" style:parent-style-name="Heading_20_2">
      <style:paragraph-properties fo:margin-top="0cm" fo:margin-bottom="0cm" loext:contextual-spacing="false" fo:line-height="150%"/>
      <style:text-properties style:font-name="Inter" fo:font-size="10pt" style:font-size-asian="10pt" style:font-size-complex="10pt"/>
    </style:style>
    <style:style style:name="P9" style:family="paragraph" style:parent-style-name="Heading_20_2">
      <style:paragraph-properties fo:margin-top="0cm" fo:margin-bottom="0cm" loext:contextual-spacing="false" fo:line-height="100%" fo:text-align="center" style:justify-single-word="false"/>
      <style:text-properties style:font-name="Inter"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Heading_20_3">
      <style:paragraph-properties fo:margin-top="0cm" fo:margin-bottom="0cm" loext:contextual-spacing="false" fo:line-height="100%"/>
      <style:text-properties style:font-name="Inter" fo:font-size="10pt" style:font-size-asian="10pt" style:font-size-complex="10pt"/>
    </style:style>
    <style:style style:name="P11" style:family="paragraph" style:parent-style-name="Heading_20_3">
      <style:paragraph-properties fo:margin-top="0cm" fo:margin-bottom="0cm" loext:contextual-spacing="false" fo:line-height="100%" fo:text-align="center" style:justify-single-word="false"/>
      <style:text-properties style:font-name="Inter" fo:font-size="10pt" style:font-size-asian="10pt" style:font-size-complex="10pt"/>
    </style:style>
    <style:style style:name="P12" style:family="paragraph" style:parent-style-name="Heading_20_3">
      <style:paragraph-properties fo:margin-top="0cm" fo:margin-bottom="0cm" loext:contextual-spacing="false" fo:line-height="150%"/>
      <style:text-properties style:font-name="Inter" fo:font-size="10pt" style:font-size-asian="10pt" style:font-size-complex="10pt"/>
    </style:style>
    <style:style style:name="P13" style:family="paragraph" style:parent-style-name="Heading_20_3">
      <style:paragraph-properties fo:margin-top="0cm" fo:margin-bottom="0cm" loext:contextual-spacing="false" fo:line-height="100%" fo:text-align="center" style:justify-single-word="false"/>
      <style:text-properties style:font-name="Inter" fo:font-size="10pt" style:text-underline-style="solid" style:text-underline-width="auto" style:text-underline-color="font-color" style:font-size-asian="10pt" style:font-size-complex="10pt"/>
    </style:style>
    <style:style style:name="P14" style:family="paragraph" style:parent-style-name="Heading_20_2">
      <style:paragraph-properties fo:margin-top="0cm" fo:margin-bottom="0cm" loext:contextual-spacing="false" fo:line-height="100%" fo:text-align="center" style:justify-single-word="false" fo:break-before="page"/>
      <style:text-properties style:font-name="Inter" fo:font-size="14pt" style:text-underline-style="solid" style:text-underline-width="auto" style:text-underline-color="font-color" style:font-size-asian="14pt" style:font-size-complex="14pt"/>
    </style:style>
    <style:style style:name="P15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</style:style>
    <style:style style:name="P16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officeooo:paragraph-rsid="000c2040"/>
    </style:style>
    <style:style style:name="P17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officeooo:paragraph-rsid="000f0d97"/>
    </style:style>
    <style:style style:name="P18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officeooo:paragraph-rsid="001162d7"/>
    </style:style>
    <style:style style:name="P19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officeooo:paragraph-rsid="0016d3d8"/>
    </style:style>
    <style:style style:name="P20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officeooo:rsid="0016d3d8" officeooo:paragraph-rsid="0016d3d8"/>
    </style:style>
    <style:style style:name="P21" style:family="paragraph" style:parent-style-name="Standard">
      <style:paragraph-properties fo:margin-left="0.635cm" fo:margin-right="0cm" fo:margin-top="0.494cm" fo:margin-bottom="0cm" loext:contextual-spacing="false" fo:line-height="100%" fo:text-indent="0cm" style:auto-text-indent="false"/>
      <style:text-properties officeooo:paragraph-rsid="000de270"/>
    </style:style>
    <style:style style:name="P22" style:family="paragraph" style:parent-style-name="Standard">
      <style:paragraph-properties fo:margin-top="0.635cm" fo:margin-bottom="0cm" loext:contextual-spacing="false" fo:line-height="100%"/>
    </style:style>
    <style:style style:name="P23" style:family="paragraph" style:parent-style-name="Standard">
      <style:paragraph-properties fo:margin-top="0.635cm" fo:margin-bottom="0cm" loext:contextual-spacing="false" fo:line-height="100%"/>
      <style:text-properties style:font-name="Inter" fo:font-size="10pt" style:font-size-asian="10pt" style:font-size-complex="10pt"/>
    </style:style>
    <style:style style:name="P24" style:family="paragraph" style:parent-style-name="Standard">
      <style:paragraph-properties fo:margin-top="0.635cm" fo:margin-bottom="0cm" loext:contextual-spacing="false" fo:line-height="150%"/>
      <style:text-properties style:font-name="Inter" fo:font-size="10pt" style:font-size-asian="10pt" style:font-size-complex="10pt"/>
    </style:style>
    <style:style style:name="P25" style:family="paragraph" style:parent-style-name="Standard">
      <style:paragraph-properties fo:margin-top="0.635cm" fo:margin-bottom="0cm" loext:contextual-spacing="false" fo:line-height="100%" fo:text-align="center" style:justify-single-word="false"/>
      <style:text-properties style:font-name="Inter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.635cm" fo:margin-bottom="0cm" loext:contextual-spacing="false" fo:line-height="100%"/>
      <style:text-properties style:font-name="Inter" fo:font-size="10pt" fo:background-color="#c0c0c0" style:font-size-asian="10pt" style:font-size-complex="10pt"/>
    </style:style>
    <style:style style:name="P27" style:family="paragraph" style:parent-style-name="Standard">
      <style:paragraph-properties fo:margin-top="0.635cm" fo:margin-bottom="0cm" loext:contextual-spacing="false" fo:line-height="150%"/>
    </style:style>
    <style:style style:name="P28" style:family="paragraph" style:parent-style-name="Standard" style:list-style-name="WWNum1">
      <style:paragraph-properties fo:margin-top="0cm" fo:margin-bottom="0cm" loext:contextual-spacing="false" fo:line-height="100%"/>
    </style:style>
    <style:style style:name="P29" style:family="paragraph" style:parent-style-name="Standard" style:list-style-name="WWNum2">
      <style:paragraph-properties fo:margin-top="0cm" fo:margin-bottom="0cm" loext:contextual-spacing="false" fo:line-height="100%"/>
      <style:text-properties style:font-name="Inter" fo:font-size="10pt" style:font-size-asian="10pt" style:font-size-complex="10pt"/>
    </style:style>
    <style:style style:name="P30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Inter" fo:font-size="10pt" officeooo:rsid="0016d3d8" officeooo:paragraph-rsid="0016d3d8" style:font-size-asian="10pt" style:font-size-complex="10pt"/>
    </style:style>
    <style:style style:name="P31" style:family="paragraph" style:parent-style-name="Standard" style:list-style-name="WWNum5">
      <style:paragraph-properties fo:margin-top="0.635cm" fo:margin-bottom="0cm" loext:contextual-spacing="false" fo:line-height="150%"/>
      <style:text-properties style:font-name="Inter" fo:font-size="10pt" style:font-size-asian="10pt" style:font-size-complex="10pt"/>
    </style:style>
    <style:style style:name="P32" style:family="paragraph" style:parent-style-name="Standard" style:list-style-name="WWNum7">
      <style:paragraph-properties fo:margin-top="0.635cm" fo:margin-bottom="0cm" loext:contextual-spacing="false" fo:line-height="150%"/>
      <style:text-properties style:font-name="Inter" fo:font-size="10pt" style:font-size-asian="10pt" style:font-size-complex="10pt"/>
    </style:style>
    <style:style style:name="P33" style:family="paragraph" style:parent-style-name="Standard" style:list-style-name="WWNum9">
      <style:paragraph-properties fo:margin-top="0.635cm" fo:margin-bottom="0cm" loext:contextual-spacing="false" fo:line-height="150%"/>
      <style:text-properties style:font-name="Inter" fo:font-size="10pt" style:font-size-asian="10pt" style:font-size-complex="10pt"/>
    </style:style>
    <style:style style:name="P34" style:family="paragraph" style:parent-style-name="Standard" style:list-style-name="WWNum5">
      <style:paragraph-properties fo:margin-top="0.635cm" fo:margin-bottom="0cm" loext:contextual-spacing="false" fo:line-height="150%"/>
    </style:style>
    <style:style style:name="P35" style:family="paragraph" style:parent-style-name="Standard" style:list-style-name="WWNum6">
      <style:paragraph-properties fo:margin-top="0.635cm" fo:margin-bottom="0cm" loext:contextual-spacing="false" fo:line-height="150%"/>
    </style:style>
    <style:style style:name="P36" style:family="paragraph" style:parent-style-name="Standard" style:list-style-name="WWNum8">
      <style:paragraph-properties fo:margin-top="0.635cm" fo:margin-bottom="0cm" loext:contextual-spacing="false" fo:line-height="150%"/>
    </style:style>
    <style:style style:name="P37" style:family="paragraph" style:parent-style-name="Heading_20_1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Inter" fo:font-size="16pt" style:text-underline-style="solid" style:text-underline-type="double" style:text-underline-width="auto" style:text-underline-color="font-color" style:font-size-asian="16pt" style:font-size-complex="16pt"/>
    </style:style>
    <style:style style:name="T1" style:family="text">
      <style:text-properties style:font-name="Inter" fo:font-size="10pt" style:font-size-asian="10pt" style:font-size-complex="10pt"/>
    </style:style>
    <style:style style:name="T2" style:family="text">
      <style:text-properties style:font-name="Inter" fo:font-size="10pt" officeooo:rsid="0004d8aa" style:font-size-asian="10pt" style:font-size-complex="10pt"/>
    </style:style>
    <style:style style:name="T3" style:family="text">
      <style:text-properties style:font-name="Inter" fo:font-size="10pt" officeooo:rsid="0005d314" style:font-size-asian="10pt" style:font-size-complex="10pt"/>
    </style:style>
    <style:style style:name="T4" style:family="text">
      <style:text-properties style:font-name="Inter" fo:font-size="10pt" officeooo:rsid="00079ca4" style:font-size-asian="10pt" style:font-size-complex="10pt"/>
    </style:style>
    <style:style style:name="T5" style:family="text">
      <style:text-properties style:font-name="Inter" fo:font-size="10pt" officeooo:rsid="000922f7" style:font-size-asian="10pt" style:font-size-complex="10pt"/>
    </style:style>
    <style:style style:name="T6" style:family="text">
      <style:text-properties style:font-name="Inter" fo:font-size="10pt" officeooo:rsid="0009f694" style:font-size-asian="10pt" style:font-size-complex="10pt"/>
    </style:style>
    <style:style style:name="T7" style:family="text">
      <style:text-properties style:font-name="Inter" fo:font-size="10pt" officeooo:rsid="000c2040" style:font-size-asian="10pt" style:font-size-complex="10pt"/>
    </style:style>
    <style:style style:name="T8" style:family="text">
      <style:text-properties style:font-name="Inter" fo:font-size="10pt" officeooo:rsid="000de270" style:font-size-asian="10pt" style:font-size-complex="10pt"/>
    </style:style>
    <style:style style:name="T9" style:family="text">
      <style:text-properties style:font-name="Inter" fo:font-size="10pt" officeooo:rsid="000f0d97" style:font-size-asian="10pt" style:font-size-complex="10pt"/>
    </style:style>
    <style:style style:name="T10" style:family="text">
      <style:text-properties style:font-name="Inter" fo:font-size="10pt" officeooo:rsid="000f66e0" style:font-size-asian="10pt" style:font-size-complex="10pt"/>
    </style:style>
    <style:style style:name="T11" style:family="text">
      <style:text-properties style:font-name="Inter" fo:font-size="10pt" officeooo:rsid="001162d7" style:font-size-asian="10pt" style:font-size-complex="10pt"/>
    </style:style>
    <style:style style:name="T12" style:family="text">
      <style:text-properties style:font-name="Inter" fo:font-size="10pt" officeooo:rsid="0012b634" style:font-size-asian="10pt" style:font-size-complex="10pt"/>
    </style:style>
    <style:style style:name="T13" style:family="text">
      <style:text-properties style:font-name="Inter" fo:font-size="10pt" officeooo:rsid="00155030" style:font-size-asian="10pt" style:font-size-complex="10pt"/>
    </style:style>
    <style:style style:name="T14" style:family="text">
      <style:text-properties style:font-name="Inter" fo:font-size="10pt" officeooo:rsid="0016d3d8" style:font-size-asian="10pt" style:font-size-complex="10pt"/>
    </style:style>
    <style:style style:name="T15" style:family="text">
      <style:text-properties style:font-name="Inter" fo:font-size="10pt" officeooo:rsid="0017ee20" style:font-size-asian="10pt" style:font-size-complex="10pt"/>
    </style:style>
    <style:style style:name="T16" style:family="text">
      <style:text-properties style:font-name="Inter" fo:font-size="10pt" officeooo:rsid="001ad670" style:font-size-asian="10pt" style:font-size-complex="10pt"/>
    </style:style>
    <style:style style:name="T17" style:family="text">
      <style:text-properties style:font-name="Inter" fo:font-size="10pt" fo:font-weight="bold" style:font-size-asian="10pt" style:font-weight-asian="bold" style:font-size-complex="10pt"/>
    </style:style>
    <style:style style:name="T18" style:family="text">
      <style:text-properties officeooo:rsid="000a2575"/>
    </style:style>
    <style:style style:name="T19" style:family="text">
      <style:text-properties officeooo:rsid="0016d3d8"/>
    </style:style>
    <style:style style:name="T20" style:family="text">
      <style:text-properties officeooo:rsid="0017ee20"/>
    </style:style>
    <style:style style:name="Sect1" style:family="section">
      <style:section-properties style:editable="false">
        <style:columns fo:column-count="3" fo:column-gap="0.392cm">
          <style:column style:rel-width="21845*" fo:start-indent="0cm" fo:end-indent="0.196cm"/>
          <style:column style:rel-width="21845*" fo:start-indent="0.196cm" fo:end-indent="0.196cm"/>
          <style:column style:rel-width="21845*" fo:start-indent="0.196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4" style:family="section">
      <style:section-properties style:editable="false">
        <style:columns fo:column-count="3" fo:column-gap="1.27cm">
          <style:column style:rel-width="21845*" fo:start-indent="0cm" fo:end-indent="0.635cm"/>
          <style:column style:rel-width="21845*" fo:start-indent="0.635cm" fo:end-indent="0.635cm"/>
          <style:column style:rel-width="21845*" fo:start-indent="0.635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XP, Levels, and Achievements System Documentation</text:h>
      <text:p text:style-name="P3">This document provides a comprehensive overview of the XP (Experience Points), level, and achievement systems in the Synergy Portal.</text:p>
      <text:h text:style-name="P7" text:outline-level="2"/>
      <text:h text:style-name="P9" text:outline-level="2">Level System</text:h>
      <text:h text:style-name="P10" text:outline-level="3"/>
      <text:h text:style-name="P10" text:outline-level="3">Overview</text:h>
      <text:list xml:id="list3768407716" text:style-name="WWNum1">
        <text:list-item>
          <text:p text:style-name="P28"><text:span text:style-name="T17">Total Levels</text:span><text:span text:style-name="T1">: 2</text:span><text:span text:style-name="T15">6</text:span></text:p>
        </text:list-item>
        <text:list-item>
          <text:p text:style-name="P28"><text:span text:style-name="T17">Maximum Level</text:span><text:span text:style-name="T1">: Level 2</text:span><text:span text:style-name="T15">6</text:span><text:span text:style-name="T1"> </text:span><text:span text:style-name="T15">Synergy God – Final Level</text:span></text:p>
        </text:list-item>
        <text:list-item>
          <text:p text:style-name="P28"><text:span text:style-name="T17">Level Calculation</text:span><text:span text:style-name="T1">: Levels are calculated based on a combination of SNRG holdings (70% weight) and XP (30% weight)</text:span></text:p>
        </text:list-item>
      </text:list>
      <text:h text:style-name="P10" text:outline-level="3"/>
      <text:h text:style-name="P10" text:outline-level="3"/>
      <text:h text:style-name="P10" text:outline-level="3">Level Calculation Formula</text:h>
      <text:p text:style-name="P6">holdingScore = (holdings / 45,000,000) * 0.7 </text:p>
      <text:p text:style-name="P6">xpScore = (totalXP / 50,000) * 0.3 </text:p>
      <text:p text:style-name="P6">combinedScore = holdingScore + xpScore level = floor(combinedScore * 25) + 1 </text:p>
      <text:p text:style-name="P2"/>
      <text:p text:style-name="P2"/>
      <text:p text:style-name="P2">Constants:</text:p>
      <text:list xml:id="list3286265385" text:style-name="WWNum2">
        <text:list-item>
          <text:p text:style-name="P29">Maximum Holdings: 45,000,000 SNRG</text:p>
        </text:list-item>
        <text:list-item>
          <text:p text:style-name="P29">Maximum XP: <text:span text:style-name="T18">1.000.</text:span>000 <text:span text:style-name="T20">+</text:span>XP</text:p>
        </text:list-item>
        <text:list-item>
          <text:p text:style-name="P29"/>
        </text:list-item>
      </text:list>
      <text:h text:style-name="P10" text:outline-level="3"/>
      <text:h text:style-name="P10" text:outline-level="3"/>
      <text:h text:style-name="P11" text:outline-level="3">Level Progression by XP Only</text:h>
      <text:p text:style-name="P5">Note: Actual levels depend on both holdings and XP, but for XP-only progression:</text:p>
      <text:p text:style-name="P4"/>
      <text:section text:style-name="Sect1" text:name="TextSection">
        <text:p text:style-name="P15"><text:span text:style-name="T17">Level 1</text:span><text:span text:style-name="T1">: 0 - </text:span><text:span text:style-name="T2">500</text:span><text:span text:style-name="T1"> XP</text:span></text:p>
        <text:p text:style-name="P15"><text:span text:style-name="T17">Level 2</text:span><text:span text:style-name="T1">: </text:span><text:span text:style-name="T2">501</text:span><text:span text:style-name="T1"> – </text:span><text:span text:style-name="T2">1.250</text:span><text:span text:style-name="T1"> XP</text:span></text:p>
        <text:p text:style-name="P15"><text:span text:style-name="T17">Level 3</text:span><text:span text:style-name="T1">: </text:span><text:span text:style-name="T2">1.251</text:span><text:span text:style-name="T1"> – </text:span><text:span text:style-name="T2">2.250</text:span><text:span text:style-name="T1"> XP</text:span></text:p>
        <text:p text:style-name="P15"><text:span text:style-name="T17">Level 4</text:span><text:span text:style-name="T1">: </text:span><text:span text:style-name="T2">2.251</text:span><text:span text:style-name="T1"> – </text:span><text:span text:style-name="T2">3.500</text:span><text:span text:style-name="T1"> XP</text:span></text:p>
        <text:p text:style-name="P15"><text:span text:style-name="T17">Level 5</text:span><text:span text:style-name="T1">: </text:span><text:span text:style-name="T5">3.501</text:span><text:span text:style-name="T1"> – </text:span><text:span text:style-name="T3">5.000</text:span><text:span text:style-name="T1"> XP</text:span></text:p>
        <text:p text:style-name="P15"><text:span text:style-name="T17">Level 6</text:span><text:span text:style-name="T1">: </text:span><text:span text:style-name="T5">5.001</text:span><text:span text:style-name="T1"> – </text:span><text:span text:style-name="T3">6.750</text:span><text:span text:style-name="T1"> XP</text:span></text:p>
        <text:p text:style-name="P15"><text:span text:style-name="T17">Level 7</text:span><text:span text:style-name="T1">: </text:span><text:span text:style-name="T5">6.751</text:span><text:span text:style-name="T1"> – </text:span><text:span text:style-name="T3">8.750</text:span><text:span text:style-name="T1"> XP</text:span></text:p>
        <text:p text:style-name="P15"><text:span text:style-name="T17">Level 8</text:span><text:span text:style-name="T1">: </text:span><text:span text:style-name="T5">8.751</text:span><text:span text:style-name="T1"> – </text:span><text:span text:style-name="T3">11.000</text:span><text:span text:style-name="T1"> XP</text:span></text:p>
        <text:p text:style-name="P15"><text:span text:style-name="T17">Level 9</text:span><text:span text:style-name="T1">: </text:span><text:span text:style-name="T5">11.001</text:span><text:span text:style-name="T1"> – </text:span><text:span text:style-name="T3">13.500</text:span><text:span text:style-name="T1"> XP</text:span></text:p>
        <text:p text:style-name="P15"><text:span text:style-name="T17">Level 10</text:span><text:span text:style-name="T1">: </text:span><text:span text:style-name="T5">13.501</text:span><text:span text:style-name="T1"> – </text:span><text:span text:style-name="T3">16250</text:span><text:span text:style-name="T1">XP</text:span></text:p>
        <text:p text:style-name="P15"><text:span text:style-name="T17">Level 11</text:span><text:span text:style-name="T1">: </text:span><text:span text:style-name="T6">16.251</text:span><text:span text:style-name="T1"> - </text:span><text:span text:style-name="T3">19250</text:span><text:span text:style-name="T1"> XP</text:span></text:p>
        <text:p text:style-name="P15"><text:span text:style-name="T17">Level 12</text:span><text:span text:style-name="T1">: </text:span><text:span text:style-name="T6">19.251</text:span><text:span text:style-name="T1"> - </text:span><text:span text:style-name="T3">22500</text:span><text:span text:style-name="T1"> XP</text:span></text:p>
        <text:p text:style-name="P15"><text:span text:style-name="T17">Level 13</text:span><text:span text:style-name="T1">: </text:span><text:span text:style-name="T6">22.501</text:span><text:span text:style-name="T1"> - </text:span><text:span text:style-name="T3">26000</text:span><text:span text:style-name="T1"> XP</text:span></text:p>
        <text:p text:style-name="P15"><text:span text:style-name="T17">Level 14</text:span><text:span text:style-name="T1">: 26,00</text:span><text:span text:style-name="T6">1</text:span><text:span text:style-name="T1"> - </text:span><text:span text:style-name="T3">29750</text:span><text:span text:style-name="T1"> XP</text:span></text:p>
        <text:p text:style-name="P15"><text:span text:style-name="T17">Level 15</text:span><text:span text:style-name="T1">: </text:span><text:span text:style-name="T6">29.751</text:span><text:span text:style-name="T1"> - </text:span><text:span text:style-name="T4">33750</text:span><text:span text:style-name="T1"> XP</text:span></text:p>
      </text:section>
      <text:section text:style-name="Sect2" text:name="Section1">
        <text:p text:style-name="P3"/>
      </text:section>
      <text:section text:style-name="Sect3" text:name="Section2">
        <text:p text:style-name="P15"><text:span text:style-name="T17">Level 16</text:span><text:span text:style-name="T1">: </text:span><text:span text:style-name="T6">33.751</text:span><text:span text:style-name="T1"> - </text:span><text:span text:style-name="T5">38000</text:span><text:span text:style-name="T1"> XP</text:span></text:p>
        <text:p text:style-name="P15"><text:span text:style-name="T17">Level 17</text:span><text:span text:style-name="T1">: </text:span><text:span text:style-name="T6">38.001</text:span><text:span text:style-name="T1"> - </text:span><text:span text:style-name="T5">42500</text:span><text:span text:style-name="T1"> XP</text:span></text:p>
        <text:p text:style-name="P15"><text:span text:style-name="T17">Level 18</text:span><text:span text:style-name="T1">: </text:span><text:span text:style-name="T6">42.501</text:span><text:span text:style-name="T1"> - </text:span><text:span text:style-name="T5">47250</text:span><text:span text:style-name="T1"> XP</text:span></text:p>
        <text:p text:style-name="P15"><text:span text:style-name="T17">Level 19</text:span><text:span text:style-name="T1">: </text:span><text:span text:style-name="T6">47.251</text:span><text:span text:style-name="T1"> - </text:span><text:span text:style-name="T5">50000</text:span><text:span text:style-name="T1"> XP</text:span></text:p>
        <text:p text:style-name="P15"><text:span text:style-name="T17">Level 20</text:span><text:span text:style-name="T1">: </text:span><text:span text:style-name="T6">50.001</text:span><text:span text:style-name="T1"> – </text:span><text:span text:style-name="T5">75.000</text:span><text:span text:style-name="T1"> XP</text:span></text:p>
        <text:p text:style-name="P15"><text:span text:style-name="T17">Level 21</text:span><text:span text:style-name="T1">: </text:span><text:span text:style-name="T6">75.001</text:span><text:span text:style-name="T1"> – </text:span><text:span text:style-name="T5">125.000</text:span><text:span text:style-name="T1"> XP</text:span></text:p>
        <text:p text:style-name="P15"><text:span text:style-name="T17">Level 22</text:span><text:span text:style-name="T1">: </text:span><text:span text:style-name="T6">125.001</text:span><text:span text:style-name="T1"> – </text:span><text:span text:style-name="T5">250.000</text:span><text:span text:style-name="T1"> XP</text:span></text:p>
        <text:p text:style-name="P15"><text:span text:style-name="T17">Level 23</text:span><text:span text:style-name="T1">: </text:span><text:span text:style-name="T6">250.001</text:span><text:span text:style-name="T1"> – </text:span><text:span text:style-name="T5">500.000</text:span><text:span text:style-name="T1"> XP</text:span></text:p>
        <text:p text:style-name="P15"><text:span text:style-name="T17">Level 24</text:span><text:span text:style-name="T1">: </text:span><text:span text:style-name="T6">500.001</text:span><text:span text:style-name="T1"> – </text:span><text:span text:style-name="T5">750.000</text:span><text:span text:style-name="T1"> XP</text:span></text:p>
        <text:p text:style-name="P19"><text:span text:style-name="T17">Level 25</text:span><text:span text:style-name="T1">: </text:span><text:span text:style-name="T6">750.001</text:span><text:span text:style-name="T1"> – </text:span><text:span text:style-name="T16">999.999</text:span><text:span text:style-name="T1"> XP</text:span></text:p>
        <text:p text:style-name="P30">level 26 : 1.000.00 + </text:p>
      </text:section>
      <text:section text:style-name="Sect2" text:name="Section3">
        <text:h text:style-name="P10" text:outline-level="3"/>
        <text:h text:style-name="P13" text:outline-level="3"/>
        <text:h text:style-name="P13" text:outline-level="3">Rank Names by Level</text:h>
        <text:h text:style-name="P13" text:outline-level="3"/>
      </text:section>
      <text:section text:style-name="Sect4" text:name="Section4">
        <text:p text:style-name="P21"><text:span text:style-name="T17">Level 1</text:span><text:span text:style-name="T1">: </text:span><text:span text:style-name="T8">SynergyTrainee</text:span></text:p>
        <text:p text:style-name="P15"><text:span text:style-name="T17">Level 2</text:span><text:span text:style-name="T1">: </text:span><text:span text:style-name="T8">Synergy </text:span><text:span text:style-name="T10">Rookie</text:span></text:p>
        <text:p text:style-name="P15"><text:span text:style-name="T17">Level 3</text:span><text:span text:style-name="T1">: <text:s/></text:span><text:span text:style-name="T11">Synergy </text:span><text:span text:style-name="T1">Scout</text:span></text:p>
        <text:p text:style-name="P15"><text:span text:style-name="T17">Level 4</text:span><text:span text:style-name="T1">: </text:span><text:span text:style-name="T11">Synergy Pathfinder</text:span></text:p>
        <text:p text:style-name="P18"><text:span text:style-name="T17">Level 5</text:span><text:span text:style-name="T1">: </text:span><text:span text:style-name="T11">Synergy Vanguard <text:s/></text:span></text:p>
        <text:p text:style-name="P15"><text:span text:style-name="T17">Level 6</text:span><text:span text:style-name="T1">: </text:span><text:span text:style-name="T11">Synergy </text:span><text:span text:style-name="T1">Specialist</text:span></text:p>
        <text:p text:style-name="P15"><text:span text:style-name="T17">Level 7</text:span><text:span text:style-name="T1">: </text:span><text:span text:style-name="T11">Synergy Agent</text:span></text:p>
        <text:p text:style-name="P15"><text:span text:style-name="T17">Level 8</text:span><text:span text:style-name="T1">: </text:span><text:span text:style-name="T12">Synergy Phantom Tech </text:span></text:p>
        <text:p text:style-name="P15"><text:span text:style-name="T17">Level 9</text:span><text:span text:style-name="T1">: </text:span><text:span text:style-name="T12">Synergy Cyber Engineer </text:span></text:p>
        <text:p text:style-name="P15"><text:span text:style-name="T17">Level 10</text:span><text:span text:style-name="T1">: </text:span><text:span text:style-name="T12">Synergy </text:span><text:span text:style-name="T1">Architect</text:span></text:p>
        <text:p text:style-name="P15"><text:span text:style-name="T17">Level 11</text:span><text:span text:style-name="T1">: </text:span><text:span text:style-name="T12">Synergy </text:span><text:span text:style-name="T1">Strategist</text:span></text:p>
        <text:p text:style-name="P15"><text:span text:style-name="T17">Level 12</text:span><text:span text:style-name="T1">: </text:span><text:span text:style-name="T12">Synergy </text:span><text:span text:style-name="T1">Tactician</text:span></text:p>
        <text:p text:style-name="P15"><text:span text:style-name="T17">Level 13</text:span><text:span text:style-name="T1">: </text:span><text:span text:style-name="T12">Synergy </text:span><text:span text:style-name="T1">Commander</text:span></text:p>
        <text:p text:style-name="P15"><text:span text:style-name="T17">Level 14</text:span><text:span text:style-name="T1">: </text:span><text:span text:style-name="T12">Synergy Elite Captain </text:span></text:p>
        <text:p text:style-name="P15"><text:span text:style-name="T17">Level 15</text:span><text:span text:style-name="T1">: </text:span><text:span text:style-name="T12">Synergy Special Forces </text:span></text:p>
      </text:section>
      <text:section text:style-name="Sect2" text:name="Section5">
        <text:p text:style-name="P3"/>
      </text:section>
      <text:section text:style-name="Sect3" text:name="Section6">
        <text:p text:style-name="P15"><text:span text:style-name="T17">Level 16</text:span><text:span text:style-name="T1">: </text:span><text:span text:style-name="T12">Synergy Black </text:span><text:span text:style-name="T1">Ops </text:span></text:p>
        <text:p text:style-name="P15"><text:span text:style-name="T17">Level 17</text:span><text:span text:style-name="T1">: </text:span><text:span text:style-name="T12">Synergy </text:span><text:span text:style-name="T1">Fleet Admiral </text:span></text:p>
        <text:p text:style-name="P15"><text:span text:style-name="T17">Level 18</text:span><text:span text:style-name="T1">: </text:span><text:span text:style-name="T12">Synergy </text:span><text:span text:style-name="T1">Joint General </text:span></text:p>
        <text:p text:style-name="P15"><text:span text:style-name="T17">Level 19</text:span><text:span text:style-name="T1">: </text:span><text:span text:style-name="T12">Synergy Overcommander </text:span></text:p>
        <text:p text:style-name="P16"><text:span text:style-name="T17">Level 20</text:span><text:span text:style-name="T1">: </text:span><text:span text:style-name="T7">Synergy Elite</text:span></text:p>
        <text:p text:style-name="P17"><text:span text:style-name="T17">Level 21</text:span><text:span text:style-name="T1">: </text:span><text:span text:style-name="T7">Synergy Champion</text:span></text:p>
        <text:p text:style-name="P15"><text:soft-page-break/><text:span text:style-name="T17">Level 22</text:span><text:span text:style-name="T1">: </text:span><text:span text:style-name="T7">Synergy </text:span><text:span text:style-name="T9">Legend</text:span></text:p>
        <text:p text:style-name="P16"><text:span text:style-name="T17">Level 23</text:span><text:span text:style-name="T1">: </text:span><text:span text:style-name="T7">Synergy Titan</text:span></text:p>
        <text:p text:style-name="P16"><text:span text:style-name="T17">Level 24</text:span><text:span text:style-name="T1">: Synergy </text:span><text:span text:style-name="T12">Apex</text:span></text:p>
        <text:p text:style-name="P15"><text:span text:style-name="T17">Level 25</text:span><text:span text:style-name="T1">: Synergy </text:span><text:span text:style-name="T12">Overlord</text:span></text:p>
        <text:p text:style-name="P20"><text:span text:style-name="T12">L</text:span><text:span text:style-name="T1">evel 26 : Synergy GOD – Final Level</text:span></text:p>
      </text:section>
      <text:section text:style-name="Sect2" text:name="Section7">
        <text:p text:style-name="P1"/>
        <text:h text:style-name="P14" text:outline-level="2">Achievements System</text:h>
        <text:p text:style-name="P22"><text:span text:style-name="T1">There are </text:span><text:span text:style-name="T17">18 total achievements</text:span><text:span text:style-name="T1"> organized into 6 categories. Each achievement awards XP when unlocked.</text:span></text:p>
        <text:h text:style-name="P10" text:outline-level="3"/>
        <text:h text:style-name="P11" text:outline-level="3">Milestone Achievements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P25">Achievement ID</text:p>
            </table:table-cell>
            <table:table-cell table:style-name="Table1.A1" office:value-type="string">
              <text:p text:style-name="P25">Name</text:p>
            </table:table-cell>
            <table:table-cell table:style-name="Table1.A1" office:value-type="string">
              <text:p text:style-name="P25">Description</text:p>
            </table:table-cell>
            <table:table-cell table:style-name="Table1.A1" office:value-type="string">
              <text:p text:style-name="P25">Requirement</text:p>
            </table:table-cell>
            <table:table-cell table:style-name="Table1.A1" office:value-type="string">
              <text:p text:style-name="P25">XP Reward</text:p>
            </table:table-cell>
          </table:table-row>
          <table:table-row table:style-name="Table1.1">
            <table:table-cell table:style-name="Table1.A1" office:value-type="string">
              <text:p text:style-name="P26">first_purchase</text:p>
            </table:table-cell>
            <table:table-cell table:style-name="Table1.A1" office:value-type="string">
              <text:p text:style-name="P23">First Steps</text:p>
            </table:table-cell>
            <table:table-cell table:style-name="Table1.A1" office:value-type="string">
              <text:p text:style-name="P23">Make your first SNRG purchase</text:p>
            </table:table-cell>
            <table:table-cell table:style-name="Table1.A1" office:value-type="string">
              <text:p text:style-name="P23">1 transaction</text:p>
            </table:table-cell>
            <table:table-cell table:style-name="Table1.A1" office:value-type="string">
              <text:p text:style-name="P23">100 XP</text:p>
            </table:table-cell>
          </table:table-row>
        </table:table>
        <text:p text:style-name="P23"/>
        <text:h text:style-name="P11" text:outline-level="3">Holding Achievements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office:value-type="string">
              <text:p text:style-name="P25">Achievement ID</text:p>
            </table:table-cell>
            <table:table-cell table:style-name="Table2.A1" office:value-type="string">
              <text:p text:style-name="P25">Name</text:p>
            </table:table-cell>
            <table:table-cell table:style-name="Table2.A1" office:value-type="string">
              <text:p text:style-name="P25">Description</text:p>
            </table:table-cell>
            <table:table-cell table:style-name="Table2.A1" office:value-type="string">
              <text:p text:style-name="P25">Requirement</text:p>
            </table:table-cell>
            <table:table-cell table:style-name="Table2.A1" office:value-type="string">
              <text:p text:style-name="P25">XP Reward</text:p>
            </table:table-cell>
          </table:table-row>
          <table:table-row table:style-name="Table2.1">
            <table:table-cell table:style-name="Table2.A1" office:value-type="string">
              <text:p text:style-name="P26">holder_1k</text:p>
            </table:table-cell>
            <table:table-cell table:style-name="Table2.A1" office:value-type="string">
              <text:p text:style-name="P23">Emerging Holder</text:p>
            </table:table-cell>
            <table:table-cell table:style-name="Table2.A1" office:value-type="string">
              <text:p text:style-name="P23">Hold 1,000+ SNRG</text:p>
            </table:table-cell>
            <table:table-cell table:style-name="Table2.A1" office:value-type="string">
              <text:p text:style-name="P23">1,000 SNRG</text:p>
            </table:table-cell>
            <table:table-cell table:style-name="Table2.A1" office:value-type="string">
              <text:p text:style-name="P23">250 XP</text:p>
            </table:table-cell>
          </table:table-row>
          <table:table-row table:style-name="Table2.1">
            <table:table-cell table:style-name="Table2.A1" office:value-type="string">
              <text:p text:style-name="P26">holder_10k</text:p>
            </table:table-cell>
            <table:table-cell table:style-name="Table2.A1" office:value-type="string">
              <text:p text:style-name="P23">Committed Holder</text:p>
            </table:table-cell>
            <table:table-cell table:style-name="Table2.A1" office:value-type="string">
              <text:p text:style-name="P23">Hold 10,000+ SNRG</text:p>
            </table:table-cell>
            <table:table-cell table:style-name="Table2.A1" office:value-type="string">
              <text:p text:style-name="P23">10,000 SNRG</text:p>
            </table:table-cell>
            <table:table-cell table:style-name="Table2.A1" office:value-type="string">
              <text:p text:style-name="P23">500 XP</text:p>
            </table:table-cell>
          </table:table-row>
          <table:table-row table:style-name="Table2.1">
            <table:table-cell table:style-name="Table2.A1" office:value-type="string">
              <text:p text:style-name="P26">holder_50k</text:p>
            </table:table-cell>
            <table:table-cell table:style-name="Table2.A1" office:value-type="string">
              <text:p text:style-name="P23">Established Holder</text:p>
            </table:table-cell>
            <table:table-cell table:style-name="Table2.A1" office:value-type="string">
              <text:p text:style-name="P23">Hold 50,000+ SNRG</text:p>
            </table:table-cell>
            <table:table-cell table:style-name="Table2.A1" office:value-type="string">
              <text:p text:style-name="P23">50,000 SNRG</text:p>
            </table:table-cell>
            <table:table-cell table:style-name="Table2.A1" office:value-type="string">
              <text:p text:style-name="P23">750 XP</text:p>
            </table:table-cell>
          </table:table-row>
          <table:table-row table:style-name="Table2.1">
            <table:table-cell table:style-name="Table2.A1" office:value-type="string">
              <text:p text:style-name="P26">holder_100k</text:p>
            </table:table-cell>
            <table:table-cell table:style-name="Table2.A1" office:value-type="string">
              <text:p text:style-name="P23">Major Holder</text:p>
            </table:table-cell>
            <table:table-cell table:style-name="Table2.A1" office:value-type="string">
              <text:p text:style-name="P23">Hold 100,000+ SNRG</text:p>
            </table:table-cell>
            <table:table-cell table:style-name="Table2.A1" office:value-type="string">
              <text:p text:style-name="P23">100,000 SNRG</text:p>
            </table:table-cell>
            <table:table-cell table:style-name="Table2.A1" office:value-type="string">
              <text:p text:style-name="P23">1,000 XP</text:p>
            </table:table-cell>
          </table:table-row>
          <table:table-row table:style-name="Table2.1">
            <table:table-cell table:style-name="Table2.A1" office:value-type="string">
              <text:p text:style-name="P26">holder_500k</text:p>
            </table:table-cell>
            <table:table-cell table:style-name="Table2.A1" office:value-type="string">
              <text:p text:style-name="P23">Elite Holder</text:p>
            </table:table-cell>
            <table:table-cell table:style-name="Table2.A1" office:value-type="string">
              <text:p text:style-name="P23">Hold 500,000+ SNRG</text:p>
            </table:table-cell>
            <table:table-cell table:style-name="Table2.A1" office:value-type="string">
              <text:p text:style-name="P23">500,000 SNRG</text:p>
            </table:table-cell>
            <table:table-cell table:style-name="Table2.A1" office:value-type="string">
              <text:p text:style-name="P23">2,500 XP</text:p>
            </table:table-cell>
          </table:table-row>
          <table:table-row table:style-name="Table2.1">
            <table:table-cell table:style-name="Table2.A1" office:value-type="string">
              <text:p text:style-name="P26">holder_1m</text:p>
            </table:table-cell>
            <table:table-cell table:style-name="Table2.A1" office:value-type="string">
              <text:p text:style-name="P23">Whale Status</text:p>
            </table:table-cell>
            <table:table-cell table:style-name="Table2.A1" office:value-type="string">
              <text:p text:style-name="P23">Hold 1,000,000+ SNRG</text:p>
            </table:table-cell>
            <table:table-cell table:style-name="Table2.A1" office:value-type="string">
              <text:p text:style-name="P23">1,000,000 SNRG</text:p>
            </table:table-cell>
            <table:table-cell table:style-name="Table2.A1" office:value-type="string">
              <text:p text:style-name="P23">5,000 XP</text:p>
            </table:table-cell>
          </table:table-row>
          <table:table-row table:style-name="Table2.1">
            <table:table-cell table:style-name="Table2.A1" office:value-type="string">
              <text:p text:style-name="P26">holder_5m</text:p>
            </table:table-cell>
            <table:table-cell table:style-name="Table2.A1" office:value-type="string">
              <text:p text:style-name="P23">Titan Status</text:p>
            </table:table-cell>
            <table:table-cell table:style-name="Table2.A1" office:value-type="string">
              <text:p text:style-name="P23">Hold 5,000,000+ SNRG</text:p>
            </table:table-cell>
            <table:table-cell table:style-name="Table2.A1" office:value-type="string">
              <text:p text:style-name="P23">5,000,000 SNRG</text:p>
            </table:table-cell>
            <table:table-cell table:style-name="Table2.A1" office:value-type="string">
              <text:p text:style-name="P23">10,000 XP</text:p>
            </table:table-cell>
          </table:table-row>
        </table:table>
        <text:p text:style-name="P23"/>
        <text:h text:style-name="P11" text:outline-level="3">Special Achievements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25">Achievement ID</text:p>
            </table:table-cell>
            <table:table-cell table:style-name="Table3.A1" office:value-type="string">
              <text:p text:style-name="P25">Name</text:p>
            </table:table-cell>
            <table:table-cell table:style-name="Table3.A1" office:value-type="string">
              <text:p text:style-name="P25">Description</text:p>
            </table:table-cell>
            <table:table-cell table:style-name="Table3.A1" office:value-type="string">
              <text:p text:style-name="P25">Requirement</text:p>
            </table:table-cell>
            <table:table-cell table:style-name="Table3.A1" office:value-type="string">
              <text:p text:style-name="P25">XP Reward</text:p>
            </table:table-cell>
          </table:table-row>
          <table:table-row table:style-name="Table3.1">
            <table:table-cell table:style-name="Table3.A1" office:value-type="string">
              <text:p text:style-name="P26">early_bird</text:p>
            </table:table-cell>
            <table:table-cell table:style-name="Table3.A1" office:value-type="string">
              <text:p text:style-name="P23">Early Supporter</text:p>
            </table:table-cell>
            <table:table-cell table:style-name="Table3.A1" office:value-type="string">
              <text:p text:style-name="P23">Join within first 30 days</text:p>
            </table:table-cell>
            <table:table-cell table:style-name="Table3.A1" office:value-type="string">
              <text:p text:style-name="P23">Join within first 30 days</text:p>
            </table:table-cell>
            <table:table-cell table:style-name="Table3.A1" office:value-type="string">
              <text:p text:style-name="P23">500 XP</text:p>
            </table:table-cell>
          </table:table-row>
        </table:table>
        <text:p text:style-name="P23"/>
        <text:h text:style-name="P11" text:outline-level="3"><text:soft-page-break/>Loyalty Achievements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 table:style-name="Table4.1">
            <table:table-cell table:style-name="Table4.A1" office:value-type="string">
              <text:p text:style-name="P25">Achievement ID</text:p>
            </table:table-cell>
            <table:table-cell table:style-name="Table4.A1" office:value-type="string">
              <text:p text:style-name="P25">Name</text:p>
            </table:table-cell>
            <table:table-cell table:style-name="Table4.A1" office:value-type="string">
              <text:p text:style-name="P25">Description</text:p>
            </table:table-cell>
            <table:table-cell table:style-name="Table4.A1" office:value-type="string">
              <text:p text:style-name="P25">Requirement</text:p>
            </table:table-cell>
            <table:table-cell table:style-name="Table4.A1" office:value-type="string">
              <text:p text:style-name="P25">XP Reward</text:p>
            </table:table-cell>
          </table:table-row>
          <table:table-row table:style-name="Table4.1">
            <table:table-cell table:style-name="Table4.A1" office:value-type="string">
              <text:p text:style-name="P26">holder_30_days</text:p>
            </table:table-cell>
            <table:table-cell table:style-name="Table4.A1" office:value-type="string">
              <text:p text:style-name="P23">Steadfast</text:p>
            </table:table-cell>
            <table:table-cell table:style-name="Table4.A1" office:value-type="string">
              <text:p text:style-name="P23">Hold for 30+ days</text:p>
            </table:table-cell>
            <table:table-cell table:style-name="Table4.A1" office:value-type="string">
              <text:p text:style-name="P23">30 days of holding</text:p>
            </table:table-cell>
            <table:table-cell table:style-name="Table4.A1" office:value-type="string">
              <text:p text:style-name="P23"><text:span text:style-name="T19">250</text:span> XP</text:p>
            </table:table-cell>
          </table:table-row>
          <table:table-row table:style-name="Table4.1">
            <table:table-cell table:style-name="Table4.A1" office:value-type="string">
              <text:p text:style-name="P26">diamond_hands</text:p>
            </table:table-cell>
            <table:table-cell table:style-name="Table4.A1" office:value-type="string">
              <text:p text:style-name="P23">Diamond Hands</text:p>
            </table:table-cell>
            <table:table-cell table:style-name="Table4.A1" office:value-type="string">
              <text:p text:style-name="P23">Hold for 90+ days</text:p>
            </table:table-cell>
            <table:table-cell table:style-name="Table4.A1" office:value-type="string">
              <text:p text:style-name="P23">90 days of holding</text:p>
            </table:table-cell>
            <table:table-cell table:style-name="Table4.A1" office:value-type="string">
              <text:p text:style-name="P23">1,<text:span text:style-name="T19">000</text:span> XP</text:p>
            </table:table-cell>
          </table:table-row>
          <table:table-row table:style-name="Table4.1">
            <table:table-cell table:style-name="Table4.A1" office:value-type="string">
              <text:p text:style-name="P26">holder_180_days</text:p>
            </table:table-cell>
            <table:table-cell table:style-name="Table4.A1" office:value-type="string">
              <text:p text:style-name="P23">Veteran Holder</text:p>
            </table:table-cell>
            <table:table-cell table:style-name="Table4.A1" office:value-type="string">
              <text:p text:style-name="P23">Hold for 180+ days</text:p>
            </table:table-cell>
            <table:table-cell table:style-name="Table4.A1" office:value-type="string">
              <text:p text:style-name="P23">180 days of holding</text:p>
            </table:table-cell>
            <table:table-cell table:style-name="Table4.A1" office:value-type="string">
              <text:p text:style-name="P23"><text:span text:style-name="T19">2.500</text:span> XP</text:p>
            </table:table-cell>
          </table:table-row>
          <table:table-row table:style-name="Table4.1">
            <table:table-cell table:style-name="Table4.A1" office:value-type="string">
              <text:p text:style-name="P26">holder_365_days</text:p>
            </table:table-cell>
            <table:table-cell table:style-name="Table4.A1" office:value-type="string">
              <text:p text:style-name="P23">Year One Champion</text:p>
            </table:table-cell>
            <table:table-cell table:style-name="Table4.A1" office:value-type="string">
              <text:p text:style-name="P23">Hold for 365+ days</text:p>
            </table:table-cell>
            <table:table-cell table:style-name="Table4.A1" office:value-type="string">
              <text:p text:style-name="P23">365 days of holding</text:p>
            </table:table-cell>
            <table:table-cell table:style-name="Table4.A1" office:value-type="string">
              <text:p text:style-name="P23"><text:span text:style-name="T19">10.000</text:span> XP</text:p>
            </table:table-cell>
          </table:table-row>
        </table:table>
        <text:p text:style-name="P23"/>
        <text:h text:style-name="P11" text:outline-level="3">Activity Achievements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office:value-type="string">
              <text:p text:style-name="P25">Achievement ID</text:p>
            </table:table-cell>
            <table:table-cell table:style-name="Table5.A1" office:value-type="string">
              <text:p text:style-name="P25">Name</text:p>
            </table:table-cell>
            <table:table-cell table:style-name="Table5.A1" office:value-type="string">
              <text:p text:style-name="P25">Description</text:p>
            </table:table-cell>
            <table:table-cell table:style-name="Table5.A1" office:value-type="string">
              <text:p text:style-name="P25">Requirement</text:p>
            </table:table-cell>
            <table:table-cell table:style-name="Table5.A1" office:value-type="string">
              <text:p text:style-name="P25">XP Reward</text:p>
            </table:table-cell>
          </table:table-row>
          <table:table-row table:style-name="Table5.1">
            <table:table-cell table:style-name="Table5.A1" office:value-type="string">
              <text:p text:style-name="P26">transaction_5</text:p>
            </table:table-cell>
            <table:table-cell table:style-name="Table5.A1" office:value-type="string">
              <text:p text:style-name="P23">Active Trader</text:p>
            </table:table-cell>
            <table:table-cell table:style-name="Table5.A1" office:value-type="string">
              <text:p text:style-name="P23">Complete 5 transactions</text:p>
            </table:table-cell>
            <table:table-cell table:style-name="Table5.A1" office:value-type="string">
              <text:p text:style-name="P23">5 transactions</text:p>
            </table:table-cell>
            <table:table-cell table:style-name="Table5.A1" office:value-type="string">
              <text:p text:style-name="P23">300 XP</text:p>
            </table:table-cell>
          </table:table-row>
          <table:table-row table:style-name="Table5.1">
            <table:table-cell table:style-name="Table5.A1" office:value-type="string">
              <text:p text:style-name="P26">transaction_10</text:p>
            </table:table-cell>
            <table:table-cell table:style-name="Table5.A1" office:value-type="string">
              <text:p text:style-name="P23">Frequent Trader</text:p>
            </table:table-cell>
            <table:table-cell table:style-name="Table5.A1" office:value-type="string">
              <text:p text:style-name="P23">Complete 10 transactions</text:p>
            </table:table-cell>
            <table:table-cell table:style-name="Table5.A1" office:value-type="string">
              <text:p text:style-name="P23">10 transactions</text:p>
            </table:table-cell>
            <table:table-cell table:style-name="Table5.A1" office:value-type="string">
              <text:p text:style-name="P23"><text:span text:style-name="T19">750</text:span> XP</text:p>
            </table:table-cell>
          </table:table-row>
          <table:table-row table:style-name="Table5.1">
            <table:table-cell table:style-name="Table5.A1" office:value-type="string">
              <text:p text:style-name="P26">transaction_25</text:p>
            </table:table-cell>
            <table:table-cell table:style-name="Table5.A1" office:value-type="string">
              <text:p text:style-name="P23">Power Trader</text:p>
            </table:table-cell>
            <table:table-cell table:style-name="Table5.A1" office:value-type="string">
              <text:p text:style-name="P23">Complete 25 transactions</text:p>
            </table:table-cell>
            <table:table-cell table:style-name="Table5.A1" office:value-type="string">
              <text:p text:style-name="P23">25 transactions</text:p>
            </table:table-cell>
            <table:table-cell table:style-name="Table5.A1" office:value-type="string">
              <text:p text:style-name="P23"><text:span text:style-name="T19">1.500</text:span> XP</text:p>
            </table:table-cell>
          </table:table-row>
          <table:table-row table:style-name="Table5.1">
            <table:table-cell table:style-name="Table5.A1" office:value-type="string">
              <text:p text:style-name="P26">transaction_50</text:p>
            </table:table-cell>
            <table:table-cell table:style-name="Table5.A1" office:value-type="string">
              <text:p text:style-name="P23">Trading Master</text:p>
            </table:table-cell>
            <table:table-cell table:style-name="Table5.A1" office:value-type="string">
              <text:p text:style-name="P23">Complete 50 transactions</text:p>
            </table:table-cell>
            <table:table-cell table:style-name="Table5.A1" office:value-type="string">
              <text:p text:style-name="P23">50 transactions</text:p>
            </table:table-cell>
            <table:table-cell table:style-name="Table5.A1" office:value-type="string">
              <text:p text:style-name="P23">3,000 XP</text:p>
            </table:table-cell>
          </table:table-row>
        </table:table>
        <text:p text:style-name="P23"/>
        <text:h text:style-name="P10" text:outline-level="3">Social Achievements</text:h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office:value-type="string">
              <text:p text:style-name="P23">Achievement ID</text:p>
            </table:table-cell>
            <table:table-cell table:style-name="Table6.A1" office:value-type="string">
              <text:p text:style-name="P23">Name</text:p>
            </table:table-cell>
            <table:table-cell table:style-name="Table6.A1" office:value-type="string">
              <text:p text:style-name="P23">Description</text:p>
            </table:table-cell>
            <table:table-cell table:style-name="Table6.A1" office:value-type="string">
              <text:p text:style-name="P23">Requirement</text:p>
            </table:table-cell>
            <table:table-cell table:style-name="Table6.A1" office:value-type="string">
              <text:p text:style-name="P23">XP Reward</text:p>
            </table:table-cell>
          </table:table-row>
          <table:table-row table:style-name="Table6.1">
            <table:table-cell table:style-name="Table6.A1" office:value-type="string">
              <text:p text:style-name="P26">referral_1</text:p>
            </table:table-cell>
            <table:table-cell table:style-name="Table6.A1" office:value-type="string">
              <text:p text:style-name="P23">Network Builder</text:p>
            </table:table-cell>
            <table:table-cell table:style-name="Table6.A1" office:value-type="string">
              <text:p text:style-name="P23">Refer 1 friend</text:p>
            </table:table-cell>
            <table:table-cell table:style-name="Table6.A1" office:value-type="string">
              <text:p text:style-name="P23">1 referral</text:p>
            </table:table-cell>
            <table:table-cell table:style-name="Table6.A1" office:value-type="string">
              <text:p text:style-name="P23">750 XP</text:p>
            </table:table-cell>
          </table:table-row>
          <table:table-row table:style-name="Table6.1">
            <table:table-cell table:style-name="Table6.A1" office:value-type="string">
              <text:p text:style-name="P26">referral_5</text:p>
            </table:table-cell>
            <table:table-cell table:style-name="Table6.A1" office:value-type="string">
              <text:p text:style-name="P23">Community Leader</text:p>
            </table:table-cell>
            <table:table-cell table:style-name="Table6.A1" office:value-type="string">
              <text:p text:style-name="P23">Refer 5 friends</text:p>
            </table:table-cell>
            <table:table-cell table:style-name="Table6.A1" office:value-type="string">
              <text:p text:style-name="P23">5 referrals</text:p>
            </table:table-cell>
            <table:table-cell table:style-name="Table6.A1" office:value-type="string">
              <text:p text:style-name="P23"><text:span text:style-name="T19">2500</text:span> XP</text:p>
            </table:table-cell>
          </table:table-row>
          <table:table-row table:style-name="Table6.1">
            <table:table-cell table:style-name="Table6.A1" office:value-type="string">
              <text:p text:style-name="P26">referral_10</text:p>
            </table:table-cell>
            <table:table-cell table:style-name="Table6.A1" office:value-type="string">
              <text:p text:style-name="P23">Network Ambassador</text:p>
            </table:table-cell>
            <table:table-cell table:style-name="Table6.A1" office:value-type="string">
              <text:p text:style-name="P23">Refer 10 friends</text:p>
            </table:table-cell>
            <table:table-cell table:style-name="Table6.A1" office:value-type="string">
              <text:p text:style-name="P23">10 referrals</text:p>
            </table:table-cell>
            <table:table-cell table:style-name="Table6.A1" office:value-type="string">
              <text:p text:style-name="P23">5,000 XP</text:p>
            </table:table-cell>
          </table:table-row>
        </table:table>
        <text:p text:style-name="P23"/>
        <text:h text:style-name="P9" text:outline-level="2"><text:soft-page-break/>Daily Rewards System</text:h>
        <text:h text:style-name="P12" text:outline-level="3">Overview</text:h>
        <text:list xml:id="list1986834435" text:style-name="WWNum5">
          <text:list-item>
            <text:p text:style-name="P31">Users can claim a daily reward once every 24 hours</text:p>
          </text:list-item>
          <text:list-item>
            <text:p text:style-name="P34"><text:span text:style-name="T1">All daily rewards grant </text:span><text:span text:style-name="T17">10 XP</text:span><text:span text:style-name="T1"> per claim </text:span><text:span text:style-name="T14">from day 1 to 6 , 40 xp on day 7 , maximum 100 xp per week</text:span></text:p>
          </text:list-item>
          <text:list-item>
            <text:p text:style-name="P31">The system tracks a 7-day cycle (though all days currently award the same amount)</text:p>
          </text:list-item>
          <text:list-item>
            <text:p text:style-name="P31">Streak tracking: Consecutive daily claims build a login streak</text:p>
          </text:list-item>
        </text:list>
        <text:h text:style-name="P12" text:outline-level="3"/>
        <text:h text:style-name="P12" text:outline-level="3">Daily Reward Schedule</text:h>
        <text:list xml:id="list2314432942" text:style-name="WWNum6">
          <text:list-item>
            <text:p text:style-name="P35"><text:span text:style-name="T17">Day 1</text:span><text:span text:style-name="T1">: 10 XP</text:span></text:p>
          </text:list-item>
          <text:list-item>
            <text:p text:style-name="P35"><text:span text:style-name="T17">Day 2</text:span><text:span text:style-name="T1">: 10 XP</text:span></text:p>
          </text:list-item>
          <text:list-item>
            <text:p text:style-name="P35"><text:span text:style-name="T17">Day 3</text:span><text:span text:style-name="T1">: 10 XP</text:span></text:p>
          </text:list-item>
          <text:list-item>
            <text:p text:style-name="P35"><text:span text:style-name="T17">Day 4</text:span><text:span text:style-name="T1">: 10 XP</text:span></text:p>
          </text:list-item>
          <text:list-item>
            <text:p text:style-name="P35"><text:span text:style-name="T17">Day 5</text:span><text:span text:style-name="T1">: 10 XP</text:span></text:p>
          </text:list-item>
          <text:list-item>
            <text:p text:style-name="P35"><text:span text:style-name="T17">Day 6</text:span><text:span text:style-name="T1">: 10 XP</text:span></text:p>
          </text:list-item>
          <text:list-item>
            <text:p text:style-name="P35"><text:span text:style-name="T17">Day 7</text:span><text:span text:style-name="T1">: </text:span><text:span text:style-name="T13">40</text:span><text:span text:style-name="T1"> XP</text:span></text:p>
          </text:list-item>
        </text:list>
        <text:p text:style-name="P24">After Day 7, the cycle resets to Day 1 (if streak is maintained).</text:p>
        <text:h text:style-name="P12" text:outline-level="3"/>
        <text:h text:style-name="P12" text:outline-level="3">How Daily Rewards Work</text:h>
        <text:list xml:id="list3268399998" text:style-name="WWNum7">
          <text:list-item>
            <text:p text:style-name="P32">Users must wait at least 24 hours between claims</text:p>
          </text:list-item>
          <text:list-item>
            <text:p text:style-name="P32">Consecutive daily claims (within 24 hours of each other) maintain the streak</text:p>
          </text:list-item>
          <text:list-item>
            <text:p text:style-name="P32">If a user misses a day, the streak resets to 1 and the cycle resets to Day 1</text:p>
          </text:list-item>
          <text:list-item>
            <text:p text:style-name="P32">XP is added to the user's total XP stored in the database</text:p>
          </text:list-item>
        </text:list>
        <text:h text:style-name="P8" text:outline-level="2"><text:soft-page-break/></text:h>
        <text:h text:style-name="P8" text:outline-level="2">XP Sources Summary</text:h>
        <text:p text:style-name="P24">Users can earn XP from the following sources:</text:p>
        <text:list xml:id="list2934885119" text:style-name="WWNum8">
          <text:list-item>
            <text:p text:style-name="P36"><text:span text:style-name="T17">Daily Check-ins</text:span><text:span text:style-name="T1">: 10 XP per day (stored in database)</text:span></text:p>
          </text:list-item>
          <text:list-item>
            <text:p text:style-name="P36"><text:span text:style-name="T17">Achievements</text:span><text:span text:style-name="T1">: Various amounts (calculated client-side, not stored in database) </text:span></text:p>
          </text:list-item>
        </text:list>
        <text:list xml:id="list2520907958" text:style-name="WWNum9">
          <text:list-item>
            <text:list>
              <text:list-item>
                <text:p text:style-name="P33">Total possible from all achievements: 37,600 XP (if all were unlockable)</text:p>
              </text:list-item>
            </text:list>
          </text:list-item>
        </text:list>
        <text:h text:style-name="P12" text:outline-level="3"/>
        <text:h text:style-name="P12" text:outline-level="3">Total XP Calculation</text:h>
        <text:p text:style-name="P24">Total XP = Database XP (daily check-ins) + Achievement XP (calculated on frontend) </text:p>
        <text:p text:style-name="P24">The achievement XP is calculated client-side based on current holdings and transaction count, and is added to the database XP for display and level calculation purposes.</text:p>
        <text:p text:style-name="P2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Arial2" svg:font-family="Arial" style:font-family-generic="swiss"/>
    <style:font-face style:name="Consolas" svg:font-family="Consolas" style:font-family-generic="roman" style:font-pitch="variable"/>
    <style:font-face style:name="Inter" svg:font-family="Int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false" style:font-name-asian="Times New Roman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en" fo:country="US" style:letter-kerning="false" style:font-name-asian="Times New Roman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loext:contextual-spacing="false" style:line-height-at-least="0.423cm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default-outline-level="1" style:list-style-name="" style:class="text">
      <style:paragraph-properties fo:margin-top="0.847cm" fo:margin-bottom="0.212cm" loext:contextual-spacing="false" style:line-height-at-least="0.423cm" fo:text-align="start" style:justify-single-word="false" fo:keep-together="always" fo:orphans="2" fo:widows="2" fo:keep-with-next="always" style:writing-mode="lr-tb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default-outline-level="2" style:list-style-name="" style:class="text">
      <style:paragraph-properties fo:margin-top="0.635cm" fo:margin-bottom="0.141cm" loext:contextual-spacing="false" style:line-height-at-least="0.423cm" fo:text-align="start" style:justify-single-word="false" fo:keep-together="always" fo:orphans="2" fo:widows="2" fo:keep-with-next="always" style:writing-mode="lr-tb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default-outline-level="3" style:list-style-name="" style:class="text">
      <style:paragraph-properties fo:margin-top="0.494cm" fo:margin-bottom="0.141cm" loext:contextual-spacing="false" style:line-height-at-least="0.423cm" fo:text-align="start" style:justify-single-word="false" fo:keep-together="always" fo:orphans="2" fo:widows="2" fo:keep-with-next="always" style:writing-mode="lr-tb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default-outline-level="4" style:list-style-name="" style:class="text">
      <style:paragraph-properties fo:margin-top="0.423cm" fo:margin-bottom="0.071cm" loext:contextual-spacing="false" style:line-height-at-least="0.423cm" fo:text-align="start" style:justify-single-word="false" fo:keep-together="always" fo:orphans="2" fo:widows="2" fo:keep-with-next="always" style:writing-mode="lr-tb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default-outline-level="5" style:list-style-name="" style:class="text">
      <style:paragraph-properties fo:margin-top="0.388cm" fo:margin-bottom="0.071cm" loext:contextual-spacing="false" style:line-height-at-least="0.423cm" fo:text-align="start" style:justify-single-word="false" fo:keep-together="always" fo:orphans="2" fo:widows="2" fo:keep-with-next="always" style:writing-mode="lr-tb"/>
      <style:text-properties fo:font-weight="bold" style:font-weight-asian="bold"/>
    </style:style>
    <style:style style:name="Heading_20_6" style:display-name="Heading 6" style:family="paragraph" style:default-outline-level="6" style:list-style-name="" style:class="text">
      <style:paragraph-properties fo:margin-top="0.353cm" fo:margin-bottom="0.071cm" loext:contextual-spacing="false" style:line-height-at-least="0.423cm" fo:text-align="start" style:justify-single-word="false" fo:keep-together="always" fo:orphans="2" fo:widows="2" fo:keep-with-next="always" style:writing-mode="lr-tb"/>
      <style:text-properties fo:font-size="10pt" fo:font-weight="bold" style:font-size-asian="10pt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08cm" fo:margin-bottom="2.54cm" fo:margin-left="3.175cm" fo:margin-right="3.175cm" style:writing-mode="lr-tb" style:layout-grid-color="#c0c0c0" style:layout-grid-lines="243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tml-to-docx</meta:initial-creator>
    <meta:keyword>html-to-docx</meta:keyword>
    <meta:editing-cycles>16</meta:editing-cycles>
    <meta:creation-date>2026-01-13T01:03:00</meta:creation-date>
    <dc:date>2026-01-14T23:54:03.869000000</dc:date>
    <meta:editing-duration>PT1H43M10S</meta:editing-duration>
    <meta:generator>Neat_Office/6.2.8.2$Windows_x86 LibreOffice_project/</meta:generator>
    <meta:document-statistic meta:table-count="6" meta:image-count="0" meta:object-count="0" meta:page-count="6" meta:paragraph-count="236" meta:word-count="926" meta:character-count="5358" meta:non-whitespace-character-count="46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